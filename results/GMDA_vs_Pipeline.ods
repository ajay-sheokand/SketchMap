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GB">
      <number:number number:decimal-places="0" number:min-decimal-places="0" number:min-integer-digits="1"/>
    </number:number-style>
    <number:number-style style:name="N10002" number:language="en" number:country="GB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1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fo:language="en" fo:country="GB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20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1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2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5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6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48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language="en" fo:country="GB" style:font-size-asian="8pt" style:font-size-complex="8pt"/>
    </style:style>
    <style:style style:name="ce28" style:family="table-cell" style:parent-style-name="Default">
      <style:text-properties fo:language="en" fo:country="GB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0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6pt" fo:language="en" fo:country="GB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anOr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6377"/>
        <table:table-row table:style-name="ro1">
          <table:table-cell table:number-columns-repeated="7"/>
          <table:table-cell table:style-name="ce1" table:number-columns-repeated="16377"/>
        </table:table-row>
        <table:table-row table:style-name="ro2">
          <table:table-cell table:style-name="ce2" office:value-type="string" calcext:value-type="string" table:number-columns-spanned="1" table:number-rows-spanned="10">
            <text:p>CanOrg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Org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" table:number-columns-repeated="16377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5]-[.D5])" office:value-type="float" office:value="0.31" calcext:value-type="float">
            <text:p>0.3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ABS([.C6]-[.D6])" office:value-type="float" office:value="0.24" calcext:value-type="float">
            <text:p>0.24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8]-[.D8])" office:value-type="float" office:value="0.23" calcext:value-type="float">
            <text:p>0.23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.56" calcext:value-type="float">
            <text:p>0.56</text:p>
          </table:table-cell>
          <table:table-cell table:style-name="ce11" table:formula="of:=ABS([.C9]-[.D9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table:formula="of:=ABS([.C10]-[.D10])" office:value-type="float" office:value="0.19" calcext:value-type="float">
            <text:p>0.19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  <table:table-cell table:style-name="ce1" table:number-columns-repeated="16377"/>
        </table:table-row>
        <table:table-row table:style-name="ro1">
          <table:table-cell table:number-columns-repeated="7"/>
          <table:table-cell table:style-name="ce1" table:number-columns-repeated="16377"/>
        </table:table-row>
      </table:table>
      <table:table table:name="Can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Can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1" calcext:value-type="float">
            <text:p>0.0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table:formula="of:=ABS([.C6]-[.D6])" office:value-type="float" office:value="0.03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table:formula="of:=ABS([.C8]-[.D8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table:formula="of:=ABS([.C10]-[.D10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table:formula="of:=ABS([.C11]-[.D11])" office:value-type="float" office:value="0.0600000000000001" calcext:value-type="float">
            <text:p>0.06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ScBias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ScBias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formula="of:=ABS([.C4]-[.D4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table:formula="of:=ABS([.C6]-[.D6])" office:value-type="float" office:value="0.06" calcext:value-type="float">
            <text:p>0.06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-0.03" office:value-type="float" office:value="-0.03" calcext:value-type="float">
            <text:p>-0.03</text:p>
          </table:table-cell>
          <table:table-cell table:style-name="ce11" table:formula="of:=ABS([.C7]-[.D7])" office:value-type="float" office:value="0.03" calcext:value-type="float">
            <text:p>0.03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0.06" office:value-type="float" office:value="-0.06" calcext:value-type="float">
            <text:p>-0.06</text:p>
          </table:table-cell>
          <table:table-cell table:style-name="ce5" table:formula="of:=-0.02" office:value-type="float" office:value="-0.02" calcext:value-type="float">
            <text:p>-0.02</text:p>
          </table:table-cell>
          <table:table-cell table:style-name="ce5" table:formula="of:=ABS([.C8]-[.D8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0.03" office:value-type="float" office:value="-0.03" calcext:value-type="float">
            <text:p>-0.0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ist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5" office:value-type="string" calcext:value-type="string" table:number-columns-spanned="1" table:number-rows-spanned="10">
            <text:p>DistAcc</text:p>
          </table:table-cell>
          <table:table-cell table:style-name="ce17" office:value-type="string" calcext:value-type="string">
            <text:p>Skm</text:p>
          </table:table-cell>
          <table:table-cell table:style-name="ce17" office:value-type="string" calcext:value-type="string">
            <text:p>GMDA</text:p>
          </table:table-cell>
          <table:table-cell table:style-name="ce17" office:value-type="string" calcext:value-type="string">
            <text:p>Pipeline</text:p>
          </table:table-cell>
          <table:table-cell table:style-name="ce17" office:value-type="string" calcext:value-type="string">
            <text:p>d_DistAcc</text:p>
          </table:table-cell>
          <table:table-cell table:style-name="ce17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1" calcext:value-type="float">
            <text:p>1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3]-[.D3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2" calcext:value-type="float">
            <text:p>2</text:p>
          </table:table-cell>
          <table:table-cell table:number-columns-repeated="2" table:style-name="ce20" office:value-type="float" office:value="0.93" calcext:value-type="float">
            <text:p>0.93</text:p>
          </table:table-cell>
          <table:table-cell table:style-name="ce20" table:formula="of:=ABS([.C4]-[.D4])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3" calcext:value-type="float">
            <text:p>3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table:formula="of:=ABS([.C5]-[.D5])" office:value-type="float" office:value="0.01" calcext:value-type="float">
            <text:p>0.01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4" calcext:value-type="float">
            <text:p>4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float" office:value="0.84" calcext:value-type="float">
            <text:p>0.84</text:p>
          </table:table-cell>
          <table:table-cell table:style-name="ce21" table:formula="of:=ABS([.C6]-[.D6])" office:value-type="float" office:value="0.0900000000000001" calcext:value-type="float">
            <text:p>0.0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9" office:value-type="float" office:value="5" calcext:value-type="float">
            <text:p>5</text:p>
          </table:table-cell>
          <table:table-cell table:style-name="ce22" office:value-type="float" office:value="0.91" calcext:value-type="float">
            <text:p>0.9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ABS([.C7]-[.D7])" office:value-type="float" office:value="0.25" calcext:value-type="float">
            <text:p>0.25</text:p>
          </table:table-cell>
          <table:table-cell table:style-name="ce25" office:value-type="float" office:value="0" calcext:value-type="float">
            <text:p>0</text:p>
          </table:table-cell>
          <table:table-cell table:style-name="ce48" office:value-type="string" calcext:value-type="string">
            <text:p>Imprecise drawing on the</text:p>
            <text:p>SketchMapia’s website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table:formula="of:=ABS([.C8]-[.D8])" office:value-type="float" office:value="0.02" calcext:value-type="float">
            <text:p>0.0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7" calcext:value-type="float">
            <text:p>7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9]-[.D9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8" calcext:value-type="float">
            <text:p>8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table:formula="of:=ABS([.C10]-[.D10])" office:value-type="float" office:value="0.03" calcext:value-type="float">
            <text:p>0.03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9" calcext:value-type="float">
            <text:p>9</text:p>
          </table:table-cell>
          <table:table-cell table:style-name="ce20" office:value-type="float" office:value="0.89" calcext:value-type="float">
            <text:p>0.89</text:p>
          </table:table-cell>
          <table:table-cell table:style-name="ce20" office:value-type="float" office:value="0.84" calcext:value-type="float">
            <text:p>0.84</text:p>
          </table:table-cell>
          <table:table-cell table:style-name="ce20" table:formula="of:=ABS([.C11]-[.D11])" office:value-type="float" office:value="0.05" calcext:value-type="float">
            <text:p>0.05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t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RotBias</text:p>
            <text:p>(deg)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RotBias</text:p>
          </table:table-cell>
          <table:table-cell table:style-name="ce4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table:formula="of:=-3.61" office:value-type="float" office:value="-3.61" calcext:value-type="float">
            <text:p>-3.61</text:p>
          </table:table-cell>
          <table:table-cell table:style-name="ce11" table:formula="of:=-3" office:value-type="float" office:value="-3" calcext:value-type="float">
            <text:p>-3.00</text:p>
          </table:table-cell>
          <table:table-cell table:style-name="ce11" table:formula="of:=ABS([.C3]-[.D3])" office:value-type="float" office:value="0.61" calcext:value-type="float">
            <text:p>0.61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table:formula="of:=-4.52" office:value-type="float" office:value="-4.52" calcext:value-type="float">
            <text:p>-4.52</text:p>
          </table:table-cell>
          <table:table-cell table:style-name="ce11" table:formula="of:=-3.06" office:value-type="float" office:value="-3.06" calcext:value-type="float">
            <text:p>-3.06</text:p>
          </table:table-cell>
          <table:table-cell table:style-name="ce11" table:formula="of:=ABS([.C4]-[.D4])" office:value-type="float" office:value="1.46" calcext:value-type="float">
            <text:p>1.46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table:formula="of:=-1.45" office:value-type="float" office:value="-1.45" calcext:value-type="float">
            <text:p>-1.45</text:p>
          </table:table-cell>
          <table:table-cell table:style-name="ce5" table:formula="of:=-2.54" office:value-type="float" office:value="-2.54" calcext:value-type="float">
            <text:p>-2.54</text:p>
          </table:table-cell>
          <table:table-cell table:style-name="ce5" table:formula="of:=ABS([.C5]-[.D5])" office:value-type="float" office:value="1.09" calcext:value-type="float">
            <text:p>1.09</text:p>
          </table:table-cell>
          <table:table-cell table:style-name="ce14" office:value-type="float" office:value="3" calcext:value-type="float">
            <text:p>3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table:formula="of:=-75.13" office:value-type="float" office:value="-75.13" calcext:value-type="float">
            <text:p>-75.13</text:p>
          </table:table-cell>
          <table:table-cell table:style-name="ce5" table:formula="of:=-79.09" office:value-type="float" office:value="-79.09" calcext:value-type="float">
            <text:p>-79.09</text:p>
          </table:table-cell>
          <table:table-cell table:style-name="ce5" table:formula="of:=ABS([.C6]-[.D6])" office:value-type="float" office:value="3.96000000000001" calcext:value-type="float">
            <text:p>3.96</text:p>
          </table:table-cell>
          <table:table-cell table:style-name="ce14" office:value-type="float" office:value="5" calcext:value-type="float">
            <text:p>5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table:formula="of:=-101.58" office:value-type="float" office:value="-101.58" calcext:value-type="float">
            <text:p>-101.58</text:p>
          </table:table-cell>
          <table:table-cell table:style-name="ce11" table:formula="of:=-101.94" office:value-type="float" office:value="-101.94" calcext:value-type="float">
            <text:p>-101.94</text:p>
          </table:table-cell>
          <table:table-cell table:style-name="ce11" table:formula="of:=ABS([.C7]-[.D7])" office:value-type="float" office:value="0.359999999999999" calcext:value-type="float">
            <text:p>0.36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3.83" office:value-type="float" office:value="-3.83" calcext:value-type="float">
            <text:p>-3.83</text:p>
          </table:table-cell>
          <table:table-cell table:style-name="ce5" table:formula="of:=-3.96" office:value-type="float" office:value="-3.96" calcext:value-type="float">
            <text:p>-3.96</text:p>
          </table:table-cell>
          <table:table-cell table:style-name="ce5" table:formula="of:=ABS([.C8]-[.D8])" office:value-type="float" office:value="0.13" calcext:value-type="float">
            <text:p>0.13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table:formula="of:=+3.52" office:value-type="float" office:value="3.52" calcext:value-type="float">
            <text:p>3.52</text:p>
          </table:table-cell>
          <table:table-cell table:style-name="ce11" table:formula="of:=ABS([.C9]-[.D9])" office:value-type="float" office:value="1.47" calcext:value-type="float">
            <text:p>1.47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43.45" office:value-type="float" office:value="-43.45" calcext:value-type="float">
            <text:p>-43.45</text:p>
          </table:table-cell>
          <table:table-cell table:style-name="ce5" table:formula="of:=-36.83" office:value-type="float" office:value="-36.83" calcext:value-type="float">
            <text:p>-36.83</text:p>
          </table:table-cell>
          <table:table-cell table:style-name="ce5" table:formula="of:=ABS([.C10]-[.D10])" office:value-type="float" office:value="6.62" calcext:value-type="float">
            <text:p>6.62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29" office:value-type="float" office:value="9" calcext:value-type="float">
            <text:p>9</text:p>
          </table:table-cell>
          <table:table-cell table:style-name="ce30" table:formula="of:=-79.5" office:value-type="float" office:value="-79.5" calcext:value-type="float">
            <text:p>-79.50</text:p>
          </table:table-cell>
          <table:table-cell table:style-name="ce30" table:formula="of:=-71.11" office:value-type="float" office:value="-71.11" calcext:value-type="float">
            <text:p>-71.11</text:p>
          </table:table-cell>
          <table:table-cell table:style-name="ce30" table:formula="of:=ABS([.C11]-[.D11])" office:value-type="float" office:value="8.39" calcext:value-type="float">
            <text:p>8.39</text:p>
          </table:table-cell>
          <table:table-cell table:style-name="ce31" office:value-type="float" office:value="0" calcext:value-type="float">
            <text:p>0</text:p>
          </table:table-cell>
          <table:table-cell table:style-name="ce27" office:value-type="string" calcext:value-type="string">
            <text:p>Measure sensitive to the order of landmarks</text:p>
            <text:p>comparisons (cause: sin/cos in Python)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g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Ang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Ang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3" calcext:value-type="float">
            <text:p>0.93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099999999999999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4" calcext:value-type="float">
            <text:p>0.94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table:formula="of:=ABS([.C6]-[.D6])" office:value-type="float" office:value="0.0299999999999999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0.91" calcext:value-type="float">
            <text:p>0.91</text:p>
          </table:table-cell>
          <table:table-cell table:style-name="ce5" table:formula="of:=ABS([.C8]-[.D8])" office:value-type="float" office:value="0" calcext:value-type="float">
            <text:p>0.00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table:formula="of:=ABS([.C11]-[.D11])" office:value-type="float" office:value="0.0199999999999999" calcext:value-type="float">
            <text:p>0.02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09:13:53.49447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6:25:11.315589100</meta:creation-date>
    <dc:date>2026-05-06T11:24:41.497159000</dc:date>
    <meta:editing-duration>PT7H32M11S</meta:editing-duration>
    <meta:editing-cycles>30</meta:editing-cycles>
    <meta:generator>LibreOffice/26.2.2.2$Windows_X86_64 LibreOffice_project/1f77d10d6938fd34972958f64b2bcfa54f8b1ba5</meta:generator>
    <meta:document-statistic meta:table-count="6" meta:cell-count="310" meta:object-count="0"/>
  </office:meta>
</office:document-meta>
</file>